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top="0.353cm" fo:margin-bottom="0.353cm" style:contextual-spacing="false" fo:text-align="center" style:justify-single-word="false"/>
      <style:text-properties fo:color="#1c1e2c" loext:opacity="100%" fo:font-size="28pt" fo:font-weight="bold" style:font-size-asian="28pt" style:font-weight-asian="bold" style:font-size-complex="28pt" style:font-weight-complex="bold"/>
    </style:style>
    <style:style style:name="P2" style:family="paragraph" style:parent-style-name="Standard">
      <style:paragraph-properties fo:margin-top="0.004cm" fo:margin-bottom="0cm" style:contextual-spacing="false" fo:text-align="center" style:justify-single-word="false"/>
      <style:text-properties fo:color="#6b6b76" loext:opacity="100%" style:font-name="Consolas" fo:font-size="10pt" officeooo:rsid="000c1eff" officeooo:paragraph-rsid="000c1eff" style:font-name-asian="Consolas1" style:font-size-asian="10pt" style:font-name-complex="Consolas1" style:font-size-complex="10pt"/>
    </style:style>
    <style:style style:name="P3" style:family="paragraph" style:parent-style-name="Standard">
      <style:paragraph-properties fo:margin-top="0.004cm" fo:margin-bottom="0cm" style:contextual-spacing="false" fo:text-align="center" style:justify-single-word="false"/>
      <style:text-properties fo:color="#6b6b76" loext:opacity="100%" style:font-name="Consolas" fo:font-size="10pt" officeooo:paragraph-rsid="000c1eff" style:font-name-asian="Consolas1" style:font-size-asian="10pt" style:font-name-complex="Consolas1" style:font-size-complex="10pt"/>
    </style:style>
    <style:style style:name="P4" style:family="paragraph" style:parent-style-name="Standard">
      <style:paragraph-properties fo:margin-top="0.004cm" fo:margin-bottom="0cm" style:contextual-spacing="false" fo:text-align="center" style:justify-single-word="false"/>
      <style:text-properties fo:color="#6c5ce7" loext:opacity="100%" style:font-name="Consolas" fo:font-size="10pt" fo:letter-spacing="0.053cm" fo:font-weight="bold" officeooo:rsid="000c1eff" officeooo:paragraph-rsid="000c1eff" style:font-name-asian="Consolas1" style:font-size-asian="10pt" style:font-weight-asian="bold" style:font-name-complex="Consolas1" style:font-size-complex="10pt" style:font-weight-complex="bold"/>
    </style:style>
    <style:style style:name="P5" style:family="paragraph" style:parent-style-name="Standard">
      <style:paragraph-properties fo:margin-top="0.004cm" fo:margin-bottom="0cm" style:contextual-spacing="false" fo:text-align="left" style:justify-single-word="false"/>
      <style:text-properties fo:color="#6c5ce7" loext:opacity="100%" style:font-name="Consolas" fo:font-size="10pt" fo:letter-spacing="0.053cm" fo:font-weight="bold" officeooo:rsid="000c1eff" officeooo:paragraph-rsid="000c1eff" style:font-name-asian="Consolas1" style:font-size-asian="10pt" style:font-weight-asian="bold" style:font-name-complex="Consolas1" style:font-size-complex="10pt" style:font-weight-complex="bold"/>
    </style:style>
    <style:style style:name="P6" style:family="paragraph" style:parent-style-name="Standard">
      <style:paragraph-properties fo:margin-top="0.106cm" fo:margin-bottom="0.106cm" style:contextual-spacing="false"/>
      <style:text-properties fo:color="#1c1e2c" loext:opacity="100%" style:font-name="Calibri" fo:font-size="20pt" fo:font-weight="bold" style:font-name-asian="Calibri1" style:font-size-asian="20pt" style:font-weight-asian="bold" style:font-name-complex="Calibri1" style:font-size-complex="20pt" style:font-weight-complex="bold"/>
    </style:style>
    <style:style style:name="P7" style:family="paragraph" style:parent-style-name="Standard">
      <style:paragraph-properties fo:margin-top="0cm" fo:margin-bottom="0.459cm" style:contextual-spacing="false"/>
    </style:style>
    <style:style style:name="P8" style:family="paragraph" style:parent-style-name="Standard">
      <loext:graphic-properties draw:fill="solid" draw:fill-color="#f2f1f8"/>
      <style:paragraph-properties fo:margin-left="0.353cm" fo:margin-top="0.071cm" fo:margin-bottom="0.353cm" style:contextual-spacing="false" fo:background-color="#f2f1f8"/>
      <style:text-properties fo:color="#6b6b76" loext:opacity="100%" style:font-name="Consolas" fo:font-size="10pt" fo:font-style="italic" style:font-name-asian="Consolas1" style:font-size-asian="10pt" style:font-style-asian="italic" style:font-name-complex="Consolas1" style:font-size-complex="10pt" style:font-style-complex="italic"/>
    </style:style>
    <style:style style:name="P9" style:family="paragraph" style:parent-style-name="Standard">
      <style:paragraph-properties fo:margin-top="0cm" fo:margin-bottom="0.106cm" style:contextual-spacing="false"/>
      <style:text-properties fo:color="#6c5ce7"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0" style:family="paragraph" style:parent-style-name="Standard">
      <style:paragraph-properties fo:margin-top="0cm" fo:margin-bottom="0.282cm" style:contextual-spacing="false" fo:line-height="125%"/>
    </style:style>
    <style:style style:name="P11" style:family="paragraph" style:parent-style-name="Standard">
      <style:paragraph-properties fo:margin-top="0cm" fo:margin-bottom="0.282cm" style:contextual-spacing="false" fo:line-height="125%"/>
      <style:text-properties fo:color="#242424" loext:opacity="100%" style:font-name="Calibri" fo:font-size="11.5pt" style:font-name-asian="Calibri1" style:font-size-asian="11.5pt" style:font-name-complex="Calibri1" style:font-size-complex="11.5pt"/>
    </style:style>
    <style:style style:name="P12" style:family="paragraph" style:parent-style-name="Standard">
      <loext:graphic-properties draw:fill="solid" draw:fill-color="#f2f1f8"/>
      <style:paragraph-properties fo:margin-left="0.353cm" fo:margin-top="0.071cm" fo:margin-bottom="0cm" style:contextual-spacing="false" fo:background-color="#f2f1f8"/>
    </style:style>
    <style:style style:name="P13" style:family="paragraph" style:parent-style-name="Standard" style:master-page-name="Converted2">
      <style:paragraph-properties fo:margin-top="0cm" fo:margin-bottom="0cm" style:contextual-spacing="false" style:page-number="auto"/>
    </style:style>
    <style:style style:name="P14" style:family="paragraph" style:parent-style-name="Standard">
      <style:paragraph-properties fo:margin-top="0cm" fo:margin-bottom="0.106cm" style:contextual-spacing="false"/>
      <style:text-properties fo:color="#12a594"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5" style:family="paragraph" style:parent-style-name="Standard">
      <style:paragraph-properties fo:margin-top="0cm" fo:margin-bottom="0.106cm" style:contextual-spacing="false"/>
    </style:style>
    <style:style style:name="P16" style:family="paragraph" style:parent-style-name="Standard" style:master-page-name="Converted3">
      <style:paragraph-properties fo:margin-top="0cm" fo:margin-bottom="0cm" style:contextual-spacing="false" style:page-number="auto"/>
    </style:style>
    <style:style style:name="P17" style:family="paragraph" style:parent-style-name="Standard">
      <style:paragraph-properties fo:margin-top="0cm" fo:margin-bottom="0.106cm" style:contextual-spacing="false"/>
      <style:text-properties fo:color="#c97a2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P18" style:family="paragraph" style:parent-style-name="Standard" style:master-page-name="Converted4">
      <style:paragraph-properties fo:margin-top="0cm" fo:margin-bottom="0cm" style:contextual-spacing="false" style:page-number="auto"/>
    </style:style>
    <style:style style:name="T1" style:family="text">
      <style:text-properties fo:color="#6b6b76" loext:opacity="100%" style:font-name="Consolas" fo:font-size="10pt" style:font-name-asian="Consolas1" style:font-size-asian="10pt" style:font-name-complex="Consolas1" style:font-size-complex="10pt"/>
    </style:style>
    <style:style style:name="T2" style:family="text">
      <style:text-properties fo:color="#6c5ce7" loext:opacity="100%" style:font-name="Consolas" fo:font-size="10pt" fo:font-weight="bold" style:font-name-asian="Consolas1" style:font-size-asian="10pt" style:font-weight-asian="bold" style:font-name-complex="Consolas1" style:font-size-complex="10pt" style:font-weight-complex="bold"/>
    </style:style>
    <style:style style:name="T3" style:family="text">
      <style:text-properties fo:color="#242424" loext:opacity="100%" style:font-name="Calibri" fo:font-size="11.5pt" style:font-name-asian="Calibri1" style:font-size-asian="11.5pt" style:font-name-complex="Calibri1" style:font-size-complex="11.5pt"/>
    </style:style>
    <style:style style:name="T4" style:family="text">
      <style:text-properties fo:color="#242424" loext:opacity="100%" style:font-name="Calibri" fo:font-size="11.5pt" officeooo:rsid="000c1eff" style:font-name-asian="Calibri1" style:font-size-asian="11.5pt" style:font-name-complex="Calibri1" style:font-size-complex="11.5pt"/>
    </style:style>
    <style:style style:name="T5" style:family="text">
      <style:text-properties fo:color="#6b6b76" loext:opacity="100%" style:font-name="Consolas" fo:font-size="10pt" fo:font-style="italic" style:font-name-asian="Consolas1" style:font-size-asian="10pt" style:font-style-asian="italic" style:font-name-complex="Consolas1" style:font-size-complex="10pt" style:font-style-complex="italic"/>
    </style:style>
    <style:style style:name="T6" style:family="text">
      <style:text-properties fo:color="#6b6b76" loext:opacity="100%" style:font-name="Consolas" fo:font-size="10pt" fo:font-style="italic" officeooo:rsid="000dbe16" style:font-name-asian="Consolas1" style:font-size-asian="10pt" style:font-style-asian="italic" style:font-name-complex="Consolas1" style:font-size-complex="10pt" style:font-style-complex="italic"/>
    </style:style>
    <style:style style:name="T7" style:family="text">
      <style:text-properties fo:color="#6b6b76" loext:opacity="100%" style:font-name="Consolas" fo:font-size="10pt" fo:font-style="italic" officeooo:rsid="000c1eff" style:font-name-asian="Consolas1" style:font-size-asian="10pt" style:font-style-asian="italic" style:font-name-complex="Consolas1" style:font-size-complex="10pt" style:font-style-complex="italic"/>
    </style:style>
    <style:style style:name="T8" style:family="text">
      <style:text-properties fo:color="#12a594"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9" style:family="text">
      <style:text-properties fo:color="#12a594" loext:opacity="100%" style:font-name="Consolas" fo:font-size="10pt" fo:letter-spacing="0.053cm" fo:font-weight="bold" officeooo:rsid="000c1eff" style:font-name-asian="Consolas1" style:font-size-asian="10pt" style:font-weight-asian="bold" style:font-name-complex="Consolas1" style:font-size-complex="10pt" style:font-weight-complex="bold"/>
    </style:style>
    <style:style style:name="T10" style:family="text">
      <style:text-properties fo:color="#12a594" loext:opacity="100%" style:font-name="Consolas" fo:font-size="10pt" fo:letter-spacing="0.053cm" fo:font-weight="bold" officeooo:rsid="000dbe16" style:font-name-asian="Consolas1" style:font-size-asian="10pt" style:font-weight-asian="bold" style:font-name-complex="Consolas1" style:font-size-complex="10pt" style:font-weight-complex="bold"/>
    </style:style>
    <style:style style:name="T11" style:family="text">
      <style:text-properties fo:color="#12a594" loext:opacity="100%" style:font-name="Consolas" fo:font-size="10pt" fo:font-weight="bold" style:font-name-asian="Consolas1" style:font-size-asian="10pt" style:font-weight-asian="bold" style:font-name-complex="Consolas1" style:font-size-complex="10pt" style:font-weight-complex="bold"/>
    </style:style>
    <style:style style:name="T12" style:family="text">
      <style:text-properties fo:color="#242424" loext:opacity="100%" style:font-name="Calibri" fo:font-size="11.5pt" officeooo:rsid="000dbe16" style:font-name-asian="Calibri1" style:font-size-asian="11.5pt" style:font-name-complex="Calibri1" style:font-size-complex="11.5pt"/>
    </style:style>
    <style:style style:name="T13" style:family="text">
      <style:text-properties fo:color="#12a594"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14" style:family="text">
      <style:text-properties fo:color="#12a594" loext:opacity="100%" style:font-name="Consolas" fo:font-size="9pt" fo:letter-spacing="0.035cm" fo:font-weight="bold" officeooo:rsid="000dbe16" style:font-name-asian="Consolas1" style:font-size-asian="9pt" style:font-weight-asian="bold" style:font-name-complex="Consolas1" style:font-size-complex="9pt" style:font-weight-complex="bold"/>
    </style:style>
    <style:style style:name="T15" style:family="text">
      <style:text-properties fo:color="#c97a2b"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16" style:family="text">
      <style:text-properties fo:color="#c97a2b" loext:opacity="100%" style:font-name="Consolas" fo:font-size="10pt" fo:letter-spacing="0.053cm" fo:font-weight="bold" officeooo:rsid="000dbe16" style:font-name-asian="Consolas1" style:font-size-asian="10pt" style:font-weight-asian="bold" style:font-name-complex="Consolas1" style:font-size-complex="10pt" style:font-weight-complex="bold"/>
    </style:style>
    <style:style style:name="T17" style:family="text">
      <style:text-properties fo:color="#c97a2b" loext:opacity="100%" style:font-name="Consolas" fo:font-size="10pt" fo:font-weight="bold" style:font-name-asian="Consolas1" style:font-size-asian="10pt" style:font-weight-asian="bold" style:font-name-complex="Consolas1" style:font-size-complex="10pt" style:font-weight-complex="bold"/>
    </style:style>
    <style:style style:name="T18" style:family="text">
      <style:text-properties fo:color="#c97a2b" loext:opacity="100%" style:font-name="Consolas" fo:font-size="9pt" fo:letter-spacing="0.035cm" fo:font-weight="bold" style:font-name-asian="Consolas1" style:font-size-asian="9pt" style:font-weight-asian="bold" style:font-name-complex="Consolas1" style:font-size-complex="9pt" style:font-weight-complex="bold"/>
    </style:style>
    <style:style style:name="T19" style:family="text">
      <style:text-properties fo:color="#c97a2b" loext:opacity="100%" style:font-name="Consolas" fo:font-size="9pt" fo:letter-spacing="0.035cm" fo:font-weight="bold" officeooo:rsid="000dbe16" style:font-name-asian="Consolas1" style:font-size-asian="9pt" style:font-weight-asian="bold" style:font-name-complex="Consolas1" style:font-size-complex="9pt" style:font-weight-complex="bold"/>
    </style:style>
    <style:style style:name="T20" style:family="text">
      <style:text-properties fo:color="#6c5ce7" loext:opacity="100%" style:font-name="Consolas" fo:font-size="10pt" fo:letter-spacing="0.053cm" fo:font-weight="bold" style:font-name-asian="Consolas1" style:font-size-asian="10pt" style:font-weight-asian="bold" style:font-name-complex="Consolas1" style:font-size-complex="10pt" style:font-weight-complex="bold"/>
    </style:style>
    <style:style style:name="T21" style:family="text">
      <style:text-properties fo:color="#6c5ce7" loext:opacity="100%" style:font-name="Consolas" fo:font-size="10pt" fo:letter-spacing="0.053cm" fo:font-weight="bold" officeooo:rsid="000dedd1" style:font-name-asian="Consolas1" style:font-size-asian="10pt" style:font-weight-asian="bold" style:font-name-complex="Consolas1" style:font-size-complex="10pt" style:font-weight-complex="bold"/>
    </style:style>
    <style:style style:name="T22" style:family="text">
      <style:text-properties fo:color="#242424" loext:opacity="100%" style:font-name="Calibri" fo:font-size="11.5pt" officeooo:rsid="000dedd1" style:font-name-asian="Calibri1" style:font-size-asian="11.5pt" style:font-name-complex="Calibri1"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ligencia Artificial y Derechos de Autor</text:p>
      <text:p text:style-name="P2">SECCIONES:</text:p>
      <text:p text:style-name="P3">01 · Creación <text:s text:c="2"/>--- <text:s text:c="2"/>02 · Marco legal <text:s text:c="2"/>--- <text:s text:c="2"/>03 · Casos reales <text:s text:c="2"/>--- <text:s text:c="2"/>04 · Futuro</text:p>
      <text:p text:style-name="P4"/>
      <text:p text:style-name="P5"/>
      <text:p text:style-name="P5">1 - BRIAM. F. LEYVA</text:p>
      <text:p text:style-name="P6">La máquina que aprende a crear</text:p>
      <text:p text:style-name="P7"><text:span text:style-name="T1">Duración estimada: </text:span><text:span text:style-name="T2">5 minutos</text:span></text:p>
      <text:p text:style-name="P8">Sección web <text:s/>1 --- "La máquina que aprende a crear" </text:p>
      <text:p text:style-name="P9">APERTURA</text:p>
      <text:p text:style-name="P10"><text:span text:style-name="T3">Buenos días / buenas tardes a todos. Hoy venimos a hablarles de un conflicto que ya está pasando, aunque muchos todavía no lo notan: el choque entre la inteligencia artificial y los derechos de autor. Yo voy a abrir esta exposición explicando algo muy simple pero clave: </text:span><text:span text:style-name="T4">C</text:span><text:span text:style-name="T3">ómo aprende una inteligencia artificial a "crear"?</text:span></text:p>
      <text:p text:style-name="P9">DESARROLLO</text:p>
      <text:p text:style-name="P11">Cuando hablamos de IA generativa, esas herramientas que escriben textos, pintan imágenes o componen música a partir de una simple instrucción hablamos de sistemas que no nacieron sabiendo nada. Tuvieron que aprender, igual que un estudiante de arte pasa años copiando técnicas de sus maestros. La diferencia es la escala: mientras un ser humano puede estudiar la obra de algunas decenas de artistas a lo largo de su vida, un modelo de IA es entrenado con millones de imágenes, textos y piezas musicales, extraídas casi siempre de internet, sin filtrar si están protegidas por derechos de autor o no.</text:p>
      <text:p text:style-name="P11">Este proceso se llama entrenamiento. Los desarrolladores construyen bases de datos gigantescas lo que se conoce como datasets, recopilando artículos de prensa, libros completos, fotografías, ilustraciones y cuadros. El modelo analiza esas obras y aprende patrones: cómo se compone un párrafo, cómo se distribuye la luz en una pintura, qué notas suelen ir juntas en una melodía. No guarda una copia literal del archivo original, pero sí interioriza su estilo.</text:p>
      <text:p text:style-name="P10"><text:soft-page-break/><text:span text:style-name="T3">Después viene la generación. Cuando alguien le pide a una IA "</text:span><text:span text:style-name="T4">U</text:span><text:span text:style-name="T3">n cuadro al estilo de tal artista" o "un texto con el tono de tal autor", el sistema no busca ese cuadro o texto en una carpeta; lo reconstruye a partir de todo lo que aprendió. Aquí es donde aparece la primera gran pregunta que va a guiar toda esta exposición: si el resultado no es una copia exacta, pero sí depende por completo de miles de obras ajenas, </text:span><text:span text:style-name="T4">E</text:span><text:span text:style-name="T3">stamos frente a un acto de inspiración, como el que tiene cualquier artista humano, o frente a una forma de copia industrial, a una escala que ningún humano podría replicar jamás?</text:span></text:p>
      <text:p text:style-name="P10"><text:span text:style-name="T3">Un ejemplo que ilustra bien esta tensión es el del robot Ai-Da, presentado como "</text:span><text:span text:style-name="T4">L</text:span><text:span text:style-name="T3">a primera robot artista humanoide del mundo". Sus pinturas ya se han vendido por más de un millón de dólares en subastas, pero legalmente no está nada claro quién es el autor real de esas obras: </text:span><text:span text:style-name="T4">L</text:span><text:span text:style-name="T3">a máquina, los ingenieros que la programaron, o nadie, porque falta el elemento humano que la ley exige?</text:span></text:p>
      <text:p text:style-name="P9">CIERRE DE MI PARTE</text:p>
      <text:p text:style-name="P11">Con esto quiero dejarles una idea clave antes de pasarle la palabra a mi compañero o compañera: la inteligencia artificial no crea de la nada. Crea a partir de nosotros, de nuestras obras, de nuestro trabajo creativo acumulado durante siglos. Y esa dependencia es exactamente lo que pone en jaque al derecho de autor tal y como lo conocemos. A continuación, vamos a ver cómo la ley está intentando responder a esta pregunta.</text:p>
      <text:p text:style-name="P12"><text:span text:style-name="T5">Transición: </text:span><text:span text:style-name="T6">P</text:span><text:span text:style-name="T5">asar el turno e indicar a </text:span><text:span text:style-name="T7">alguien</text:span><text:span text:style-name="T5"> </text:span><text:span text:style-name="T7">pasar</text:span><text:span text:style-name="T5"> a la sección <text:s/>2 de la web.</text:span></text:p>
      <text:p text:style-name="P13"><text:span text:style-name="T8">2 – </text:span><text:span text:style-name="T9">K</text:span><text:span text:style-name="T10">EVIN QUINGA</text:span></text:p>
      <text:p text:style-name="P6">La ley frente al algoritmo</text:p>
      <text:p text:style-name="P7"><text:span text:style-name="T1">Duración estimada: </text:span><text:span text:style-name="T11">5 minutos</text:span></text:p>
      <text:p text:style-name="P8">Sección web <text:s/>2 --- "La ley frente al algoritmo" (balanza y línea de tiempo)</text:p>
      <text:p text:style-name="P14">APERTURA</text:p>
      <text:p text:style-name="P10"><text:span text:style-name="T3">Gracias. Como acabamos de ver, la inteligencia artificial aprende de obras humanas para poder crear. Ahora la pregunta es: </text:span><text:span text:style-name="T4">Q</text:span><text:span text:style-name="T3">ué dice la ley al respecto? Y la respuesta corta es: todavía no lo sabe muy bien. Voy a mostrarles por qué el derecho de autor, tal como existe hoy, no fue diseñado para este problema.</text:span></text:p>
      <text:p text:style-name="P14">DESARROLLO</text:p>
      <text:p text:style-name="P11">El derecho de autor es un concepto con más de un siglo de historia. El Convenio de Berna, firmado en 1886, sentó las bases internacionales de esta protección, y desde entonces la idea central no ha cambiado: para que una obra esté protegida, tiene que existir un autor humano detrás, alguien que haya tomado decisiones creativas reales. Una máquina, por más sofisticada que sea, no encaja en esa definición.</text:p>
      <text:p text:style-name="P11">Esto se puso a prueba de forma muy concreta en Estados Unidos. En marzo de 2023, la Oficina de Copyright emitió una guía que confirmó algo que hasta entonces era solo una sospecha: una obra generada completamente por inteligencia artificial no puede registrarse como propiedad intelectual. Si una persona simplemente escribe una instrucción, un "prompt", y la IA hace todo el trabajo creativo, esa persona no puede reclamar derechos de autor sobre el resultado.</text:p>
      <text:p text:style-name="P11">Hay casos muy concretos que lo demuestran. "Zarya of the Dawn" fue una novela gráfica cuyo registro de copyright se canceló parcialmente cuando se supo que las ilustraciones habían sido generadas con Midjourney: solo se protegió el texto escrito por la autora humana, no las imágenes. Y en el caso Thaler contra la Oficina de Copyright, un desarrollador intentó registrar una obra creada de forma autónoma por su propia inteligencia artificial, alegando que la máquina era la autora. Los tribunales, incluida una corte de apelaciones en 2025, le negaron la razón: sin una mano humana guiando la creación, no hay derecho de autor posible.</text:p>
      <text:p text:style-name="P10"><text:span text:style-name="T3">Pero la ley sí deja una puerta abierta: si una persona usa la IA como herramienta para bocetar una idea, retocar una imagen o generar un primer borrador y luego </text:span><text:soft-page-break/><text:span text:style-name="T3">aporta una parte de creatividad propia claramente identificable, esa parte humana sí puede protegerse. El problema es que trazar esa línea, entre "</text:span><text:span text:style-name="T12">U</text:span><text:span text:style-name="T3">sar una herramienta" y "</text:span><text:span text:style-name="T12">D</text:span><text:span text:style-name="T3">elegar toda la creación", es extremadamente difícil, y cada país lo está resolviendo de manera distinta: China y Corea del Sur, por ejemplo, ya han reconocido cierta autoría cuando el ser humano ejerce un control creativo importante sobre el resultado final.</text:span></text:p>
      <text:p text:style-name="P10"><text:span text:style-name="T3">Además está el debate del llamado "</text:span><text:span text:style-name="T12">U</text:span><text:span text:style-name="T3">so justo" o fair use: </text:span><text:span text:style-name="T12">E</text:span><text:span text:style-name="T3">s legal usar millones de obras protegidas para entrenar un modelo, sin pedir permiso, si el objetivo es "</text:span><text:span text:style-name="T12">A</text:span><text:span text:style-name="T3">prender patrones" y no reproducir la obra tal cual? Las empresas de IA dicen que sí. Muchos autores y editoriales dicen que no. Y esa discusión, precisamente, es la que está llevando a las grandes empresas de tecnología a los tribunales.</text:span></text:p>
      <text:p text:style-name="P15"><text:span text:style-name="T13">CIERRE DE </text:span><text:span text:style-name="T14">LA PARTE DE KEVIN</text:span></text:p>
      <text:p text:style-name="P11">En resumen: la ley protege al autor humano, no al algoritmo. Pero no tiene todavía una respuesta clara sobre qué pasa con los datos que se usan para entrenar esos algoritmos. Y ese vacío es exactamente el terreno donde están naciendo las demandas más importantes de esta década, que es justo de lo que les va a hablar mi compañero a continuación.</text:p>
      <text:p text:style-name="P12"><text:span text:style-name="T5">Transición: </text:span><text:span text:style-name="T6">P</text:span><text:span text:style-name="T5">asar el turno e indicar a </text:span><text:span text:style-name="T6">alguien</text:span><text:span text:style-name="T5"> avanzar a la sección 3 de la web.</text:span></text:p>
      <text:p text:style-name="P16"><text:span text:style-name="T15">3 – </text:span><text:span text:style-name="T16">JHON REDROVAN</text:span></text:p>
      <text:p text:style-name="P6">Casos que están escribiendo la ley</text:p>
      <text:p text:style-name="P7"><text:span text:style-name="T1">Duración estimada: </text:span><text:span text:style-name="T17">5 minutos</text:span></text:p>
      <text:p text:style-name="P8">Sección web 3 --- "Casos que están escribiendo la ley" (mazo y tarjetas de casos)</text:p>
      <text:p text:style-name="P17">APERTURA</text:p>
      <text:p text:style-name="P11">Gracias. Ya vimos cómo la ley todavía no tiene una respuesta clara. Mientras eso se resuelve, la realidad no espera, en este momento hay demandas activas, en tribunales reales, entre algunas de las empresas y medios más importantes del mundo. Les voy a contar los casos que están, literalmente, escribiendo las reglas del juego.</text:p>
      <text:p text:style-name="P17">DESARROLLO</text:p>
      <text:p text:style-name="P10"><text:span text:style-name="T3">El caso más mediático es el de The New York Times contra OpenAI, iniciado en diciembre de 2023. El periódico acusa a la empresa de haber usado millones de sus artículos, sin permiso ni pago, para entrenar sus modelos de lenguaje. Lo llamativo es que el propio Times demostró que, con las instrucciones correctas, un chatbot podía reproducir fragmentos casi idénticos a sus artículos originales, algo que para ellos prueba que no se trató solo de "</text:span><text:span text:style-name="T12">A</text:span><text:span text:style-name="T3">prender un estilo", sino de memorizar contenido protegido.</text:span></text:p>
      <text:p text:style-name="P10"><text:span text:style-name="T3">Otro caso clave es el de Getty Images contra Stability AI. Getty es uno de los bancos de imágenes más grandes del mundo, y descubrió que millones de sus fotografías, muchas con su marca de agua todavía visible, habían sido usadas para entrenar un generador de imágenes por IA. La demanda busca establecer si usar fotografías protegidas, a esa escala </text:span><text:span text:style-name="T12">y</text:span><text:span text:style-name="T3"> sin licencia, es legal solo porque el objetivo final es "</text:span><text:span text:style-name="T12">E</text:span><text:span text:style-name="T3">ntrenar un modelo".</text:span></text:p>
      <text:p text:style-name="P11">También hay demandas colectivas de autores y escritores contra Meta, acusando a la empresa de haber utilizado bibliotecas piratas completas, con miles de libros protegidos, como fuente de entrenamiento para sus modelos de inteligencia artificial. Y como mencionamos antes, el caso Thaler contra la Oficina de Copyright, resuelto en 2025, confirmó en los tribunales que sin autoría humana no puede haber derechos de autor sobre lo que produce una máquina.</text:p>
      <text:p text:style-name="P10"><text:span text:style-name="T3">Del lado de los creadores individuales, miles de artistas visuales se han organizado </text:span><text:soft-page-break/><text:span text:style-name="T3">en demandas colectivas, denunciando que su estilo personal, su forma de dibujar, de iluminar </text:span><text:span text:style-name="T12">y </text:span><text:span text:style-name="T3">de componer se puede replicar hoy con solo escribir su nombre en una instrucción de texto, sin que reciban crédito ni compensación alguna.</text:span></text:p>
      <text:p text:style-name="P10"><text:span text:style-name="T3">Y qué responden las empresas de inteligencia artificial ante todo esto? Su argumento principal es que entrenar un modelo constituye "</text:span><text:span text:style-name="T12">U</text:span><text:span text:style-name="T3">so justo", afirman que el sistema aprende patrones generales, no almacena ni reproduce las obras originales, de la misma forma en que un estudiante de arte aprende de sus referentes sin estar "</text:span><text:span text:style-name="T12">C</text:span><text:span text:style-name="T3">opiando" literalmente cada cuadro que observó.</text:span></text:p>
      <text:p text:style-name="P15"><text:span text:style-name="T18">CIERRE DE </text:span><text:span text:style-name="T19">LA PARTE DE REDROVAN</text:span></text:p>
      <text:p text:style-name="P11">Estos casos todavía no tienen una sentencia definitiva en la mayoría de los países, pero el resultado que tengan va a definir, durante años, si las empresas de IA deben pagar licencias, pedir permiso o simplemente seguir entrenando con todo lo que encuentren disponible en internet. Con este panorama de fondo, mi compañero va a cerrar la exposición hablándoles de las posibles soluciones que ya se están planteando.</text:p>
      <text:p text:style-name="P12"><text:span text:style-name="T5">Transición: </text:span><text:span text:style-name="T6">P</text:span><text:span text:style-name="T5">asar el turno e indicar a </text:span><text:span text:style-name="T6">alguien</text:span><text:span text:style-name="T5"> avanzar a la sección 4 de la web.</text:span></text:p>
      <text:p text:style-name="P18"><text:span text:style-name="T20">4 - </text:span><text:span text:style-name="T21">DAVID PAUCAR</text:span></text:p>
      <text:p text:style-name="P6">¿Hacia dónde vamos?</text:p>
      <text:p text:style-name="P7"><text:span text:style-name="T1">Duración estimada: </text:span><text:span text:style-name="T2">5 minutos</text:span></text:p>
      <text:p text:style-name="P8">Sección web 4 --- "¿Hacia dónde vamos?" (caminos y tarjetas de soluciones) y sección de cierre</text:p>
      <text:p text:style-name="P9">APERTURA</text:p>
      <text:p text:style-name="P11">Gracias. Hemos visto cómo funciona el entrenamiento de la IA, qué dice y qué no dice la ley, y qué casos reales están en juego ahora mismo. Para cerrar, quiero hablarles de hacia dónde parece que se dirige todo esto, y dejarles una reflexión final para el debate.</text:p>
      <text:p text:style-name="P9">DESARROLLO</text:p>
      <text:p text:style-name="P11">Ninguna ley actual resuelve el problema por completo, pero ya hay varias salidas que gobiernos, empresas y creadores están explorando en paralelo. La primera es el licenciamiento, acuerdos pagados entre empresas de inteligencia artificial y editoriales, bancos de imágenes o discográficas, para usar su contenido de forma legal. Ya existen acuerdos de este tipo entre algunas empresas de IA y medios de comunicación importantes.</text:p>
      <text:p text:style-name="P11">La segunda salida es la transparencia: obligar a las empresas a declarar exactamente qué datos y qué obras usaron para entrenar cada modelo. Hoy, la gran mayoría de las empresas no revela esta información, lo cual hace casi imposible que un autor sepa si su obra fue usada sin permiso.</text:p>
      <text:p text:style-name="P11">La tercera es el mecanismo de opt-out, es decir, permitir que los propios creadores excluyan activamente su obra del entrenamiento de futuros modelos. Algunas plataformas ya ofrecen esta opción, aunque de forma limitada y, muchas veces, difícil de encontrar.</text:p>
      <text:p text:style-name="P11">La cuarta salida es la nueva legislación específica para inteligencia artificial. El ejemplo más avanzado es el Reglamento de IA de la Unión Europea, aprobado en 2024, que exige a las empresas documentar los datos usados para entrenar sus modelos, entre otras obligaciones de transparencia.</text:p>
      <text:p text:style-name="P10"><text:span text:style-name="T3">Y hay una quinta vía, más cercana a nuestro día a día: la coautoría declarada. Tal como exige hoy la Oficina de Copyright de Estados Unidos, cuando una obra combina </text:span><text:soft-page-break/><text:span text:style-name="T3">trabajo humano y contenido generado por IA, se debe declarar claramente qué parte hizo cada quien. Esto también nos incluye a nosotros como estudiantes y futuros profesionales, usar la IA como herramienta de apoyo, sí, pero siendo honestos sobre qué generamos nosotros mismos y qué generó la máquina.</text:span></text:p>
      <text:p text:style-name="P9">CIERRE Y CONCLUSIÓN GENERAL</text:p>
      <text:p text:style-name="P10"><text:span text:style-name="T3">Para cerrar esta exposición, queremos dejarles una idea central, la creatividad humana siempre se ha construido sobre lo que vino antes. </text:span><text:span text:style-name="T22">N</text:span><text:span text:style-name="T3">ingún artista crea completamente desde cero. Pero la inteligencia artificial hace esto a una escala, y a una velocidad, que ningún ser humano podría alcanzar jamás, y sin pedir permiso a nadie. La pregunta que les dejamos para el debate no es si la inteligencia artificial "</text:span><text:span text:style-name="T22">C</text:span><text:span text:style-name="T3">opia" o no copia. </text:span><text:span text:style-name="T22">L</text:span><text:span text:style-name="T3">a verdadera pregunta es cuánto le debemos reconocer, y cuánto le debemos pagar, a las personas que hicieron posible que esa inteligencia artificial aprendiera a crear. Muchas gracias por su atención.</text:span></text:p>
      <text:p text:style-name="P8">Fin de la exposi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7-12T07:50:04.455000000</meta:creation-date>
    <dc:date>2026-07-13T00:59:41.684720259</dc:date>
    <meta:editing-duration>PT7M17S</meta:editing-duration>
    <meta:generator>LibreOffice/26.2.4.2$Linux_X86_64 LibreOffice_project/620$Build-2</meta:generator>
    <meta:document-statistic meta:table-count="0" meta:image-count="0" meta:object-count="0" meta:page-count="8" meta:paragraph-count="62" meta:word-count="2101" meta:character-count="12545" meta:non-whitespace-character-count="10488"/>
  </office:meta>
</office:document-meta>
</file>